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left" fo:keep-with-next="auto"/>
    </style:style>
    <style:style style:name="Tableau1.A" style:family="table-column">
      <style:table-column-properties style:column-width="2.648cm"/>
    </style:style>
    <style:style style:name="Tableau1.B" style:family="table-column">
      <style:table-column-properties style:column-width="7.646cm"/>
    </style:style>
    <style:style style:name="Tableau1.C" style:family="table-column">
      <style:table-column-properties style:column-width="6.706cm"/>
    </style:style>
    <style:style style:name="Tableau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au2" style:family="table" style:master-page-name="">
      <style:table-properties style:width="17cm" style:page-number="auto" fo:break-before="auto" fo:break-after="auto" table:align="left" fo:keep-with-next="auto"/>
    </style:style>
    <style:style style:name="Tableau2.A" style:family="table-column">
      <style:table-column-properties style:column-width="3.078cm"/>
    </style:style>
    <style:style style:name="Tableau2.B" style:family="table-column">
      <style:table-column-properties style:column-width="9.379cm"/>
    </style:style>
    <style:style style:name="Tableau2.C" style:family="table-column">
      <style:table-column-properties style:column-width="4.544cm"/>
    </style:style>
    <style:style style:name="Tableau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2b2" officeooo:paragraph-rsid="0017c2b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c2b2" officeooo:paragraph-rsid="0017c2b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c2b2" officeooo:paragraph-rsid="0017c2b2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T1" style:family="text">
      <style:text-properties fo:color="#1f1f1f" loext:opacity="100%" style:font-name="Google Sans Text" loext:padding="0cm" loext:border="none"/>
    </style:style>
    <style:style style:name="T2" style:family="text">
      <style:text-properties fo:color="#1f1f1f" loext:opacity="100%" style:font-name="Google Sans Text" fo:font-weight="bold" loext:padding="0cm" loext:border="none"/>
    </style:style>
    <style:style style:name="T3" style:family="text">
      <style:text-properties fo:color="#444746" loext:opacity="100%" style:font-name="Google Sans Text" loext:padding="0cm" loext:border="none"/>
    </style:style>
    <style:style style:name="T4" style:family="text">
      <style:text-properties fo:color="#444746" loext:opacity="100%" style:font-name="Google Sans Text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 ; Portfolio</text:p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4"><text:span text:style-name="Strong_20_Emphasis"><text:span text:style-name="T1">Grand Axe</text:span></text:span></text:p>
            </table:table-cell>
            <table:table-cell table:style-name="Tableau1.A1" office:value-type="string">
              <text:p text:style-name="P4"><text:span text:style-name="Strong_20_Emphasis"><text:span text:style-name="T1">Fonctionnalités Clés Implémentées</text:span></text:span></text:p>
            </table:table-cell>
            <table:table-cell table:style-name="Tableau1.A1" office:value-type="string">
              <text:p text:style-name="P4"><text:span text:style-name="Strong_20_Emphasis"><text:span text:style-name="T1">Prompt(s) Noté(s)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5">Structure de Base</text:p>
          </table:table-cell>
          <table:table-cell table:style-name="Tableau1.A1" office:value-type="string">
            <text:p text:style-name="P4"><text:span text:style-name="T1">Mise en place des sections HTML (</text:span><text:span text:style-name="Source_20_Text"><text:span text:style-name="T3">À Propos</text:span></text:span><text:span text:style-name="T1">, </text:span><text:span text:style-name="Source_20_Text"><text:span text:style-name="T3">Compétences</text:span></text:span><text:span text:style-name="T1">, </text:span><text:span text:style-name="Source_20_Text"><text:span text:style-name="T3">Projets</text:span></text:span><text:span text:style-name="T1">, </text:span><text:span text:style-name="Source_20_Text"><text:span text:style-name="T3">Contact</text:span></text:span><text:span text:style-name="T1">). Mise en place du layout responsive (</text:span><text:span text:style-name="Source_20_Text"><text:span text:style-name="T3">.container</text:span></text:span><text:span text:style-name="T1">, Flex/Grid).</text:span></text:p>
          </table:table-cell>
          <table:table-cell table:style-name="Tableau1.A1" office:value-type="string">
            <text:p text:style-name="P6">Créer une page HTML avec les sections essentielles... Générer un CSS moderne (layout, couleurs, typographies).</text:p>
          </table:table-cell>
        </table:table-row>
        <table:table-row>
          <table:table-cell table:style-name="Tableau1.A1" office:value-type="string">
            <text:p text:style-name="P5">Thème Cosmique</text:p>
          </table:table-cell>
          <table:table-cell table:style-name="Tableau1.A1" office:value-type="string">
            <text:p text:style-name="P4"><text:span text:style-name="T1">Application du fond </text:span><text:span text:style-name="T2">Bleu Nuit (</text:span><text:span text:style-name="Source_20_Text"><text:span text:style-name="T4">#0B0B63</text:span></text:span><text:span text:style-name="T2">)</text:span><text:span text:style-name="T1"> permanent. Création d'une </text:span><text:span text:style-name="T2">Galaxie Spirale</text:span><text:span text:style-name="T1"> animée (rotation, respiration, couleurs vives).</text:span></text:p>
          </table:table-cell>
          <table:table-cell table:style-name="Tableau1.A1" office:value-type="string">
            <text:p text:style-name="P6">...mettre ce code : 0B0B63... ajouter une galaxie en fond qui sinctille... tu pense que on peut ajouter une commete qui passe...</text:p>
          </table:table-cell>
        </table:table-row>
        <table:table-row>
          <table:table-cell table:style-name="Tableau1.A1" office:value-type="string">
            <text:p text:style-name="P5">Parcours Pro</text:p>
          </table:table-cell>
          <table:table-cell table:style-name="Tableau1.A1" office:value-type="string">
            <text:p text:style-name="P4"><text:span text:style-name="T1">Ajout de la section </text:span><text:span text:style-name="Source_20_Text"><text:span text:style-name="T3">#experience</text:span></text:span><text:span text:style-name="T1">.</text:span></text:p>
          </table:table-cell>
          <table:table-cell table:style-name="Tableau1.A1" office:value-type="string">
            <text:p text:style-name="P6">on peut ajouter une partie parcours et expériences ?</text:p>
          </table:table-cell>
        </table:table-row>
        <table:table-row>
          <table:table-cell table:style-name="Tableau1.A1" office:value-type="string">
            <text:p text:style-name="P5">Mode Sombre/Clair</text:p>
          </table:table-cell>
          <table:table-cell table:style-name="Tableau1.A1" office:value-type="string">
            <text:p text:style-name="P4"><text:span text:style-name="T1">Ajout du bouton </text:span><text:span text:style-name="Source_20_Text"><text:span text:style-name="T3">#mode-toggle</text:span></text:span><text:span text:style-name="T1"> et logique de persistance via </text:span><text:span text:style-name="Source_20_Text"><text:span text:style-name="T3">localStorage</text:span></text:span><text:span text:style-name="T1"> pour basculer entre Bleu Nuit et thème Clair.</text:span></text:p>
          </table:table-cell>
          <table:table-cell table:style-name="Tableau1.A1" office:value-type="string">
            <text:p text:style-name="P6">remet moi le bouton mode sombre clair.</text:p>
          </table:table-cell>
        </table:table-row>
      </table:table>
      <text:p text:style-name="P3"><text:line-break/><text:lin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"><text:span text:style-name="Strong_20_Emphasis"><text:span text:style-name="T1">Grand Axe</text:span></text:span></text:p>
            </table:table-cell>
            <table:table-cell table:style-name="Tableau2.A1" office:value-type="string">
              <text:p text:style-name="P4"><text:span text:style-name="Strong_20_Emphasis"><text:span text:style-name="T1">Fonctionnalités Clés Implémentées</text:span></text:span></text:p>
            </table:table-cell>
            <table:table-cell table:style-name="Tableau2.A1" office:value-type="string">
              <text:p text:style-name="P4"><text:span text:style-name="Strong_20_Emphasis"><text:span text:style-name="T1">Prompt(s) Noté(s)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5">Console de Projets</text:p>
          </table:table-cell>
          <table:table-cell table:style-name="Tableau2.A1" office:value-type="string">
            <text:p text:style-name="P4"><text:span text:style-name="T1">Remplacement du carrousel par une console de fichiers interactive. Logique de filtrage et d'affichage dynamique (</text:span><text:span text:style-name="Source_20_Text"><text:span text:style-name="T3">projectsData</text:span></text:span><text:span text:style-name="T1">, </text:span><text:span text:style-name="Source_20_Text"><text:span text:style-name="T3">updateProjectDisplay</text:span></text:span><text:span text:style-name="T1">).</text:span></text:p>
          </table:table-cell>
          <table:table-cell table:style-name="Tableau2.A1" office:value-type="string">
            <text:p text:style-name="P6">fait juste les grands axes et note avec les prompt que je tai demandé...</text:p>
          </table:table-cell>
        </table:table-row>
        <table:table-row>
          <table:table-cell table:style-name="Tableau2.A1" office:value-type="string">
            <text:p text:style-name="P5">Animations sur Scroll</text:p>
          </table:table-cell>
          <table:table-cell table:style-name="Tableau2.A1" office:value-type="string">
            <text:p text:style-name="P4"><text:span text:style-name="T1">Implémentation de l'</text:span><text:span text:style-name="Source_20_Text"><text:span text:style-name="T4">IntersectionObserver</text:span></text:span><text:span text:style-name="T1"> (JS) et du CSS pour l'effet </text:span><text:span text:style-name="Source_20_Text"><text:span text:style-name="T3">fade-in/slide-up</text:span></text:span><text:span text:style-name="T1"> des cartes (</text:span><text:span text:style-name="Source_20_Text"><text:span text:style-name="T3">.animate-on-scroll</text:span></text:span><text:span text:style-name="T1">) et des sections, incluant la nouvelle timeline du </text:span><text:soft-page-break/><text:span text:style-name="T1">parcours.</text:span></text:p>
          </table:table-cell>
          <table:table-cell table:style-name="Tableau2.A1" office:value-type="string">
            <text:p text:style-name="P6">Animations d'entrée (fade-in, slide, etc.).</text:p>
          </table:table-cell>
        </table:table-row>
        <table:table-row>
          <table:table-cell table:style-name="Tableau2.A1" office:value-type="string">
            <text:p text:style-name="P5">Validation Formulaire</text:p>
          </table:table-cell>
          <table:table-cell table:style-name="Tableau2.A1" office:value-type="string">
            <text:p text:style-name="P4"><text:span text:style-name="T1">Validation des champs (email, minLength) en </text:span><text:span text:style-name="T2">temps réel</text:span><text:span text:style-name="T1"> (</text:span><text:span text:style-name="Source_20_Text"><text:span text:style-name="T3">blur</text:span></text:span><text:span text:style-name="T1"> event) et affichage des états visuels (</text:span><text:span text:style-name="Source_20_Text"><text:span text:style-name="T3">.is-valid</text:span></text:span><text:span text:style-name="T1">/</text:span><text:span text:style-name="Source_20_Text"><text:span text:style-name="T3">.is-invalid</text:span></text:span><text:span text:style-name="T1">).</text:span></text:p>
          </table:table-cell>
          <table:table-cell table:style-name="Tableau2.A1" office:value-type="string">
            <text:p text:style-name="P6">Validation du formulaire en temps réel.</text:p>
          </table:table-cell>
        </table:table-row>
        <table:table-row>
          <table:table-cell table:style-name="Tableau2.A1" office:value-type="string">
            <text:p text:style-name="P5">Formulaire Fonctionnel</text:p>
          </table:table-cell>
          <table:table-cell table:style-name="Tableau2.A1" office:value-type="string">
            <text:p text:style-name="P4"><text:span text:style-name="T1">Configuration du formulaire avec l'attribut </text:span><text:span text:style-name="Source_20_Text"><text:span text:style-name="T3">action</text:span></text:span><text:span text:style-name="T1"> (lien Formspree) et envoi des données via </text:span><text:span text:style-name="Source_20_Text"><text:span text:style-name="T4">fetch</text:span></text:span><text:span text:style-name="T1"> (AJAX) après validation réussie.</text:span></text:p>
          </table:table-cell>
          <table:table-cell table:style-name="Tableau2.A1" office:value-type="string">
            <text:p text:style-name="P6">[Votre lien Formspree]</text:p>
          </table:table-cell>
        </table:table-row>
        <table:table-row>
          <table:table-cell table:style-name="Tableau2.A1" office:value-type="string">
            <text:p text:style-name="P5">Compteur de Visites</text:p>
          </table:table-cell>
          <table:table-cell table:style-name="Tableau2.A1" office:value-type="string">
            <text:p text:style-name="P4"><text:span text:style-name="T1">Ajout du compteur dans le footer (</text:span><text:span text:style-name="Source_20_Text"><text:span text:style-name="T3">#visit-count</text:span></text:span><text:span text:style-name="T1">) basé sur le stockage local (</text:span><text:span text:style-name="Source_20_Text"><text:span text:style-name="T3">localStorage</text:span></text:span><text:span text:style-name="T1">) pour l'incrémentation des visites.</text:span></text:p>
          </table:table-cell>
          <table:table-cell table:style-name="Tableau2.A1" office:value-type="string">
            <text:p text:style-name="P6">Compteur de visites via localStorag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2:44:32.672822606</meta:creation-date>
    <dc:date>2025-11-28T22:47:59.729712844</dc:date>
    <meta:editing-duration>PT3M27S</meta:editing-duration>
    <meta:editing-cycles>1</meta:editing-cycles>
    <meta:document-statistic meta:table-count="2" meta:image-count="0" meta:object-count="0" meta:page-count="2" meta:paragraph-count="35" meta:word-count="274" meta:character-count="1962" meta:non-whitespace-character-count="1720"/>
    <meta:generator>LibreOffice/24.2.7.2$Linux_X86_64 LibreOffice_project/420$Build-2</meta:generator>
  </office:meta>
</office:document-meta>
</file>